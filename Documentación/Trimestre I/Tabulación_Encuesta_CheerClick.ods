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Arial" svg:font-family="Arial"/>
    <style:font-face style:name="Cambria" svg:font-family="Cambria"/>
    <style:font-face style:name="Google Sans" svg:font-family="'Google Sans'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504.2pt"/>
    </style:style>
    <style:style style:name="co3" style:family="table-column">
      <style:table-column-properties fo:break-before="auto" style:column-width="273.66pt"/>
    </style:style>
    <style:style style:name="co4" style:family="table-column">
      <style:table-column-properties fo:break-before="auto" style:column-width="157.66pt"/>
    </style:style>
    <style:style style:name="co5" style:family="table-column">
      <style:table-column-properties fo:break-before="auto" style:column-width="163.19pt"/>
    </style:style>
    <style:style style:name="co6" style:family="table-column">
      <style:table-column-properties fo:break-before="auto" style:column-width="84.76pt"/>
    </style:style>
    <style:style style:name="co7" style:family="table-column">
      <style:table-column-properties fo:break-before="auto" style:column-width="124.36pt"/>
    </style:style>
    <style:style style:name="co8" style:family="table-column">
      <style:table-column-properties fo:break-before="auto" style:column-width="80.56pt"/>
    </style:style>
    <style:style style:name="co9" style:family="table-column">
      <style:table-column-properties fo:break-before="auto" style:column-width="97.26pt"/>
    </style:style>
    <style:style style:name="co10" style:family="table-column">
      <style:table-column-properties fo:break-before="auto" style:column-width="184.76pt"/>
    </style:style>
    <style:style style:name="co11" style:family="table-column">
      <style:table-column-properties fo:break-before="auto" style:column-width="75.71pt"/>
    </style:style>
    <style:style style:name="co12" style:family="table-column">
      <style:table-column-properties fo:break-before="auto" style:column-width="84.05pt"/>
    </style:style>
    <style:style style:name="co13" style:family="table-column">
      <style:table-column-properties fo:break-before="auto" style:column-width="72.26pt"/>
    </style:style>
    <style:style style:name="co14" style:family="table-column">
      <style:table-column-properties fo:break-before="auto" style:column-width="181.96pt"/>
    </style:style>
    <style:style style:name="co15" style:family="table-column">
      <style:table-column-properties fo:break-before="auto" style:column-width="143.04pt"/>
    </style:style>
    <style:style style:name="co16" style:family="table-column">
      <style:table-column-properties fo:break-before="auto" style:column-width="117.41pt"/>
    </style:style>
    <style:style style:name="co17" style:family="table-column">
      <style:table-column-properties fo:break-before="auto" style:column-width="90.31pt"/>
    </style:style>
    <style:style style:name="co18" style:family="table-column">
      <style:table-column-properties fo:break-before="auto" style:column-width="93.06pt"/>
    </style:style>
    <style:style style:name="co19" style:family="table-column">
      <style:table-column-properties fo:break-before="auto" style:column-width="272.24pt"/>
    </style:style>
    <style:style style:name="co20" style:family="table-column">
      <style:table-column-properties fo:break-before="auto" style:column-width="50pt"/>
    </style:style>
    <style:style style:name="co21" style:family="table-column">
      <style:table-column-properties fo:break-before="auto" style:column-width="63.89pt"/>
    </style:style>
    <style:style style:name="co22" style:family="table-column">
      <style:table-column-properties fo:break-before="auto" style:column-width="60.46pt"/>
    </style:style>
    <style:style style:name="co23" style:family="table-column">
      <style:table-column-properties fo:break-before="auto" style:column-width="178.5pt"/>
    </style:style>
    <style:style style:name="co24" style:family="table-column">
      <style:table-column-properties fo:break-before="auto" style:column-width="83.34pt"/>
    </style:style>
    <style:style style:name="co25" style:family="table-column">
      <style:table-column-properties fo:break-before="auto" style:column-width="86.85pt"/>
    </style:style>
    <style:style style:name="co26" style:family="table-column">
      <style:table-column-properties fo:break-before="auto" style:column-width="104.14pt"/>
    </style:style>
    <style:style style:name="co27" style:family="table-column">
      <style:table-column-properties fo:break-before="auto" style:column-width="100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Preguntas">
      <style:table-properties table:display="true" style:writing-mode="lr-tb"/>
    </style:style>
    <style:style style:name="ta2" style:family="table" style:master-page-name="PageStyle_5f_Respuetas">
      <style:table-properties table:display="true" style:writing-mode="lr-tb"/>
    </style:style>
    <style:style style:name="ta3" style:family="table" style:master-page-name="PageStyle_5f_Pregunta_20_1">
      <style:table-properties table:display="true" style:writing-mode="lr-tb"/>
    </style:style>
    <style:style style:name="ta4" style:family="table" style:master-page-name="PageStyle_5f_Pregunta_20_2">
      <style:table-properties table:display="true" style:writing-mode="lr-tb"/>
    </style:style>
    <style:style style:name="ta5" style:family="table" style:master-page-name="PageStyle_5f_Pregunta_20_3">
      <style:table-properties table:display="true" style:writing-mode="lr-tb"/>
    </style:style>
    <style:style style:name="ta6" style:family="table" style:master-page-name="PageStyle_5f_Pregunta_20_4">
      <style:table-properties table:display="true" style:writing-mode="lr-tb"/>
    </style:style>
    <style:style style:name="ta7" style:family="table" style:master-page-name="PageStyle_5f_Pregunta_20_5">
      <style:table-properties table:display="true" style:writing-mode="lr-tb"/>
    </style:style>
    <style:style style:name="ta8" style:family="table" style:master-page-name="PageStyle_5f_Pregunta_20_6">
      <style:table-properties table:display="true" style:writing-mode="lr-tb"/>
    </style:style>
    <style:style style:name="ta9" style:family="table" style:master-page-name="PageStyle_5f_Pregunta_20_7">
      <style:table-properties table:display="true" style:writing-mode="lr-tb"/>
    </style:style>
    <style:style style:name="ta10" style:family="table" style:master-page-name="PageStyle_5f_Pregunta_20_8">
      <style:table-properties table:display="true" style:writing-mode="lr-tb"/>
    </style:style>
    <style:style style:name="ta11" style:family="table" style:master-page-name="PageStyle_5f_Pregunta_20_9">
      <style:table-properties table:display="true" style:writing-mode="lr-tb"/>
    </style:style>
    <style:style style:name="ta12" style:family="table" style:master-page-name="PageStyle_5f_Pregunta_20_10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19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gunt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<text:a xlink:href="https://docs.google.com/forms/d/e/1FAIpQLSff9okwoSyj7qhtKCDs1RiHFwWOBxgtIMyzsoDEdtYs_mOgUA/viewform?usp=mail_form_link" xlink:type="simple">ENCUESTA PROYECTO CHEERCLICK SYSTEMS</text:a>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1. ¿Que herramientas utiliza actualmente para organizar sus horarios de entrenamiento?</text:p>
          </table:table-cell>
          <table:table-cell/>
          <table:table-cell table:style-name="ce2" office:value-type="string" calcext:value-type="string">
            <text:p>1. Calendario Digita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2.Notas o recordatorios por WhatsApp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3. No utilzo ninguna herramienta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4.Otro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2. ¿Ha presentado dificultades al usar estas herramientas para gestionar sus horarios?</text:p>
          </table:table-cell>
          <table:table-cell/>
          <table:table-cell table:style-name="ce2" office:value-type="string" calcext:value-type="string">
            <text:p>1. Sí, he tenido dificultad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2. No, las manejo sin problema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3. No utilizo herramientas de gestió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3. ¿Tiene dificultades para gestionar su inventario personal (uniformes, bolsos, implementos deportivos, calzado, etc.)?</text:p>
          </table:table-cell>
          <table:table-cell/>
          <table:table-cell table:style-name="ce2" office:value-type="string" calcext:value-type="string">
            <text:p>1, Si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2. No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4. ¿Qué problemas ha tenido con el manejo de inventario?</text:p>
          </table:table-cell>
          <table:table-cell/>
          <table:table-cell table:style-name="ce2" office:value-type="string" calcext:value-type="string">
            <text:p>1. Incumplimiento en la entrega o reposició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2. Desorden en el registrode los elemento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3. Errores o pérdida de informació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4. No llevo un control de inventario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5. Qué tan fácil le resulta registrar una petición, queja, reclamo o sugerencia (PQRS) en la escuela Blood Tigers?</text:p>
          </table:table-cell>
          <table:table-cell/>
          <table:table-cell table:style-name="ce2" office:value-type="string" calcext:value-type="string">
            <text:p>1, Muy fáci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2. Fáci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3. Difíci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4. Muy difícil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6. Recibió respuesta a la PQRS en un tiempo adecuado?</text:p>
          </table:table-cell>
          <table:table-cell/>
          <table:table-cell table:style-name="ce2" office:value-type="string" calcext:value-type="string">
            <text:p>1. Si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2. No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3. No he registrado ninguna PQR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7. ¿Qué tan fácil es para usted registrar o hacer seguimiento al desempeño de los atletas durante los entrenamientos?</text:p>
          </table:table-cell>
          <table:table-cell/>
          <table:table-cell table:style-name="ce2" office:value-type="string" calcext:value-type="string">
            <text:p>1. Es fáci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2.Es complicado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3. No contamos con un sistema claro para registrar el desempeño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4. No aplica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8. ¿El Club <text:s/>Blood Tigers le ayuda a identificar fortalezas y debilidades en su rendimiento?</text:p>
          </table:table-cell>
          <table:table-cell/>
          <table:table-cell table:style-name="ce2" office:value-type="string" calcext:value-type="string">
            <text:p>1. Si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2. No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3. La manera actual no es la mas adecuada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4. No aplica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9. ¿Cree que identificar fortalezas y debilidades ayuda a mejorar el rendimiento deportivo?</text:p>
          </table:table-cell>
          <table:table-cell/>
          <table:table-cell table:style-name="ce2" office:value-type="string" calcext:value-type="string">
            <text:p>1. Si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2. No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3. No aplica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10. ¿Cree que la implementación de un sistema (Web y Móvil) mejoraría las problematicas mencionadas anteriormente?</text:p>
          </table:table-cell>
          <table:table-cell/>
          <table:table-cell table:style-name="ce2" office:value-type="string" calcext:value-type="string">
            <text:p>1. Mejoraría mucho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2. Mejoraría mucho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3. Tal vez mejoraría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4. No mejoraría nada</text:p>
          </table:table-cell>
          <table:table-cell table:number-columns-repeated="1020"/>
        </table:table-row>
        <table:table-row table:style-name="ro1" table:number-rows-repeated="94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puetas" table:style-name="ta2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Pregunta 1</text:p>
          </table:table-cell>
          <table:table-cell table:style-name="ce2" office:value-type="string" calcext:value-type="string">
            <text:p>Pregunta 2</text:p>
          </table:table-cell>
          <table:table-cell table:style-name="ce2" office:value-type="string" calcext:value-type="string">
            <text:p>Pregunta 3</text:p>
          </table:table-cell>
          <table:table-cell table:style-name="ce2" office:value-type="string" calcext:value-type="string">
            <text:p>Pregunta 4</text:p>
          </table:table-cell>
          <table:table-cell table:style-name="ce2" office:value-type="string" calcext:value-type="string">
            <text:p>Pregunta 5</text:p>
          </table:table-cell>
          <table:table-cell table:style-name="ce2" office:value-type="string" calcext:value-type="string">
            <text:p>Pregunta 6</text:p>
          </table:table-cell>
          <table:table-cell table:style-name="ce2" office:value-type="string" calcext:value-type="string">
            <text:p>Pregunta 7</text:p>
          </table:table-cell>
          <table:table-cell table:style-name="ce2" office:value-type="string" calcext:value-type="string">
            <text:p>Pregunta 8 </text:p>
          </table:table-cell>
          <table:table-cell table:style-name="ce2" office:value-type="string" calcext:value-type="string">
            <text:p>Pregunta 9</text:p>
          </table:table-cell>
          <table:table-cell table:style-name="ce2" office:value-type="string" calcext:value-type="string">
            <text:p>Pregunta 10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1" table:number-rows-repeated="97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gunta 1" table:style-name="ta3"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1.¿Que herramientas utiliza actualmente para organizar sus horarios de entrenamiento?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spuesta</text:p>
          </table:table-cell>
          <table:table-cell table:style-name="ce4" office:value-type="string" calcext:value-type="string">
            <text:p>Código</text:p>
          </table:table-cell>
          <table:table-cell table:style-name="ce4" office:value-type="string" calcext:value-type="string">
            <text:p>Frecuencia</text:p>
          </table:table-cell>
          <table:table-cell table:style-name="ce4" office:value-type="string" calcext:value-type="string">
            <text:p>Porcentaj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alendario Digita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COUNTIF([$Respuetas.B4:.B23];1)" office:value-type="float" office:value="1" calcext:value-type="float">
            <text:p>1</text:p>
          </table:table-cell>
          <table:table-cell table:style-name="ce9" table:formula="of:=[.D4]/[.$D$8]" office:value-type="percentage" office:value="0.05" calcext:value-type="percentage">
            <text:p>5.00%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otas o recordatorios por WhatsApp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COUNTIF([$Respuetas.B4:.B23];2)" office:value-type="float" office:value="9" calcext:value-type="float">
            <text:p>9</text:p>
          </table:table-cell>
          <table:table-cell table:style-name="ce9" table:formula="of:=[.D5]/[.$D$8]" office:value-type="percentage" office:value="0.45" calcext:value-type="percentage">
            <text:p>45.00%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o utilzo ninguna herramienta</text:p>
          </table:table-cell>
          <table:table-cell table:style-name="ce7" office:value-type="float" office:value="3" calcext:value-type="float">
            <text:p>3</text:p>
          </table:table-cell>
          <table:table-cell table:style-name="ce6" table:formula="of:=COUNTIF([$Respuetas.B4:.B23];3)" office:value-type="float" office:value="10" calcext:value-type="float">
            <text:p>10</text:p>
          </table:table-cell>
          <table:table-cell table:style-name="ce9" table:formula="of:=[.D6]/[.$D$8]" office:value-type="percentage" office:value="0.5" calcext:value-type="percentage">
            <text:p>50.00%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Otro</text:p>
          </table:table-cell>
          <table:table-cell table:style-name="ce7" office:value-type="float" office:value="4" calcext:value-type="float">
            <text:p>4</text:p>
          </table:table-cell>
          <table:table-cell table:style-name="ce6" table:formula="of:=COUNTIF([$Respuetas.B7:.B26];4)" office:value-type="float" office:value="0" calcext:value-type="float">
            <text:p>0</text:p>
          </table:table-cell>
          <table:table-cell table:style-name="ce9" table:formula="of:=[.D7]/[.$D$8]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8"/>
          <table:table-cell table:style-name="ce2" table:formula="of:=SUM([.D4:.D7])" office:value-type="float" office:value="20" calcext:value-type="float">
            <text:p>20</text:p>
          </table:table-cell>
          <table:table-cell table:style-name="ce10" table:formula="of:=SUM([.E4:.E7])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'Pregunta 1'.F24" table:end-x="33.48pt" table:end-y="6.75pt" draw:z-index="0" draw:name="Chart 1" draw:style-name="gr1" draw:text-style-name="P1" svg:width="397.47pt" svg:height="228.73pt" svg:x="4.11pt" svg:y="14.26pt">
              <draw:object draw:notify-on-update-of-ranges="'Pregunta 1'.B4:'Pregunta 1'.B7 'Pregunta 1'.D4:'Pregunta 1'.D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991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gunta 2" table:style-name="ta4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2. ¿Ha presentado dificultades al usar estas herramientas para gestionar sus horarios?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/>
          <table:table-cell table:style-name="ce11" table:number-columns-repeated="4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Respuesta</text:p>
          </table:table-cell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Frecuencia</text:p>
          </table:table-cell>
          <table:table-cell table:style-name="ce2" office:value-type="string" calcext:value-type="string">
            <text:p>Porcentaj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í, he tenido dificultad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[.D5]/[.$D$8]" office:value-type="percentage" office:value="0.35" calcext:value-type="percentage">
            <text:p>35%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o, las manejo sin problem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[.D6]/[.$D$8]" office:value-type="percentage" office:value="0.15" calcext:value-type="percentage">
            <text:p>15%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o utilizo herramientas de gestión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COUNTIF([$Respuetas.C4:.C23];3)" office:value-type="float" office:value="10" calcext:value-type="float">
            <text:p>10</text:p>
          </table:table-cell>
          <table:table-cell table:style-name="ce12" table:formula="of:=[.D7]/[.$D$8]" office:value-type="percentage" office:value="0.5" calcext:value-type="percentage">
            <text:p>50%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8"/>
          <table:table-cell table:style-name="ce2" table:formula="of:=SUM([.D4:.D7])" office:value-type="float" office:value="20" calcext:value-type="float">
            <text:p>20</text:p>
          </table:table-cell>
          <table:table-cell table:style-name="ce12" table:formula="of:=[.D8]/[.$D$8]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Pregunta 2'.F24" table:end-x="35.83pt" table:end-y="12.73pt" draw:z-index="0" draw:name="Chart 2" draw:style-name="gr1" draw:text-style-name="P1" svg:width="420.72pt" svg:height="218.98pt" svg:x="3.37pt" svg:y="14.26pt">
              <draw:object draw:notify-on-update-of-ranges="'Pregunta 2'.B4:'Pregunta 2'.B7 'Pregunta 2'.E2:'Pregunta 2'.E3 'Pregunta 2'.E4:'Pregunta 2'.E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99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gunta 3" table:style-name="ta5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3. ¿Tiene dificultades para gestionar su inventario personal (uniformes, bolsos, implementos deportivos, calzado, etc.)?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Respuesta</text:p>
          </table:table-cell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Frecuencia</text:p>
          </table:table-cell>
          <table:table-cell table:style-name="ce2" office:value-type="string" calcext:value-type="string">
            <text:p>Porcentaj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<text:s/>Sí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COUNTIF([$Respuetas.D4:.D23];1)" office:value-type="float" office:value="15" calcext:value-type="float">
            <text:p>15</text:p>
          </table:table-cell>
          <table:table-cell table:style-name="ce12" table:formula="of:=[.D5]/[.$D$6]" office:value-type="percentage" office:value="3" calcext:value-type="percentage">
            <text:p>300%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COUNTIF([$Respuetas.D4:.D23];2)" office:value-type="float" office:value="5" calcext:value-type="float">
            <text:p>5</text:p>
          </table:table-cell>
          <table:table-cell table:style-name="ce12" table:formula="of:=[.D6]/[.$D$6]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8"/>
          <table:table-cell table:style-name="ce2" table:formula="of:=SUM([.D5:.D6])" office:value-type="float" office:value="20" calcext:value-type="float">
            <text:p>20</text:p>
          </table:table-cell>
          <table:table-cell table:style-name="ce12" table:formula="of:=[.D7]/[.$D$6]" office:value-type="percentage" office:value="4" calcext:value-type="percentage">
            <text:p>400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Pregunta 3'.F23" table:end-x="24.41pt" table:end-y="9.01pt" draw:z-index="0" draw:name="Chart 3" draw:style-name="gr1" draw:text-style-name="P1" svg:width="304.47pt" svg:height="215.23pt" svg:x="92.24pt" svg:y="14.26pt">
              <draw:object draw:notify-on-update-of-ranges="'Pregunta 3'.B5:'Pregunta 3'.B6 'Pregunta 3'.D4:'Pregunta 3'.D4 'Pregunta 3'.D5:'Pregunta 3'.D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991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gunta 4" table:style-name="ta6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4. ¿Qué problemas ha tenido con el manejo de inventario?</text:p>
          </table:table-cell>
          <table:table-cell table:style-name="ce11" table:number-columns-repeated="6"/>
          <table:table-cell table:number-columns-repeated="1016"/>
        </table:table-row>
        <table:table-row table:style-name="ro1">
          <table:table-cell/>
          <table:table-cell table:style-name="ce11" table:number-columns-repeated="7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Respuesta</text:p>
          </table:table-cell>
          <table:table-cell table:style-name="ce4" office:value-type="string" calcext:value-type="string">
            <text:p>Código</text:p>
          </table:table-cell>
          <table:table-cell table:style-name="ce4" office:value-type="string" calcext:value-type="string">
            <text:p>Frecuencia</text:p>
          </table:table-cell>
          <table:table-cell table:style-name="ce4" office:value-type="string" calcext:value-type="string">
            <text:p>Porcentaj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Incumplimiento en la entrega o reposició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COUNTIF([$Respuetas.E4:.E23];1)" office:value-type="float" office:value="4" calcext:value-type="float">
            <text:p>4</text:p>
          </table:table-cell>
          <table:table-cell table:style-name="ce9" table:formula="of:=[.D5]/[.$D$9]" office:value-type="percentage" office:value="0.2" calcext:value-type="percentage">
            <text:p>20.00%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esorden en el registrode los elementos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COUNTIF([$Respuetas.E4:.E23];2)" office:value-type="float" office:value="8" calcext:value-type="float">
            <text:p>8</text:p>
          </table:table-cell>
          <table:table-cell table:style-name="ce9" table:formula="of:=[.D6]/[.$D$9]" office:value-type="percentage" office:value="0.4" calcext:value-type="percentage">
            <text:p>40.00%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Errores o pérdida de información</text:p>
          </table:table-cell>
          <table:table-cell table:style-name="ce7" office:value-type="float" office:value="3" calcext:value-type="float">
            <text:p>3</text:p>
          </table:table-cell>
          <table:table-cell table:style-name="ce6" table:formula="of:=COUNTIF([$Respuetas.E4:.E23];3)" office:value-type="float" office:value="0" calcext:value-type="float">
            <text:p>0</text:p>
          </table:table-cell>
          <table:table-cell table:style-name="ce9" table:formula="of:=[.D7]/[.$D$9]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o llevo un control de inventario</text:p>
          </table:table-cell>
          <table:table-cell table:style-name="ce7" office:value-type="float" office:value="4" calcext:value-type="float">
            <text:p>4</text:p>
          </table:table-cell>
          <table:table-cell table:style-name="ce6" table:formula="of:=COUNTIF([$Respuetas.E4:.E23];4)" office:value-type="float" office:value="8" calcext:value-type="float">
            <text:p>8</text:p>
          </table:table-cell>
          <table:table-cell table:style-name="ce9" table:formula="of:=[.D8]/[.$D$9]" office:value-type="percentage" office:value="0.4" calcext:value-type="percentage">
            <text:p>40.00%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8"/>
          <table:table-cell table:style-name="ce2" table:formula="of:=SUM([.D5:.D8])" office:value-type="float" office:value="20" calcext:value-type="float">
            <text:p>20</text:p>
          </table:table-cell>
          <table:table-cell table:style-name="ce10" table:formula="of:=SUM([.E5:.E8])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Pregunta 4'.F26" table:end-x="36.6pt" table:end-y="4.48pt" draw:z-index="0" draw:name="Chart 4" draw:style-name="gr1" draw:text-style-name="P1" svg:width="448.47pt" svg:height="230.97pt" svg:x="4.88pt" svg:y="9.75pt">
              <draw:object draw:notify-on-update-of-ranges="'Pregunta 4'.B5:'Pregunta 4'.B8 'Pregunta 4'.D4:'Pregunta 4'.D4 'Pregunta 4'.D5:'Pregunta 4'.D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98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gunta 5" table:style-name="ta7">
        <table:table-column table:style-name="co1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5. ¿Qué tan fácil le resulta registrar una petición, queja, reclamo o sugerencia (PQRS) en el Club Blood Tigers Cheers?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13" table:number-columns-repeated="6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Respuesta</text:p>
          </table:table-cell>
          <table:table-cell table:style-name="ce4" office:value-type="string" calcext:value-type="string">
            <text:p>Código</text:p>
          </table:table-cell>
          <table:table-cell table:style-name="ce4" office:value-type="string" calcext:value-type="string">
            <text:p>Frecuencia</text:p>
          </table:table-cell>
          <table:table-cell table:style-name="ce4" office:value-type="string" calcext:value-type="string">
            <text:p>Porcentaje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Muy fáci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COUNTIF([$Respuetas.F3:.F22];1)" office:value-type="float" office:value="2" calcext:value-type="float">
            <text:p>2</text:p>
          </table:table-cell>
          <table:table-cell table:style-name="ce9" table:formula="of:=[.D5]/[.$D$9]" office:value-type="percentage" office:value="0.1" calcext:value-type="percentage">
            <text:p>10.00%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Fácil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COUNTIF([$Respuetas.F4:.F23];2)" office:value-type="float" office:value="5" calcext:value-type="float">
            <text:p>5</text:p>
          </table:table-cell>
          <table:table-cell table:style-name="ce9" table:formula="of:=[.D6]/[.$D$9]" office:value-type="percentage" office:value="0.25" calcext:value-type="percentage">
            <text:p>25.00%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Difícil</text:p>
          </table:table-cell>
          <table:table-cell table:style-name="ce7" office:value-type="float" office:value="3" calcext:value-type="float">
            <text:p>3</text:p>
          </table:table-cell>
          <table:table-cell table:style-name="ce6" table:formula="of:=COUNTIF([$Respuetas.F5:.F24];3)" office:value-type="float" office:value="13" calcext:value-type="float">
            <text:p>13</text:p>
          </table:table-cell>
          <table:table-cell table:style-name="ce9" table:formula="of:=[.D7]/[.$D$9]" office:value-type="percentage" office:value="0.65" calcext:value-type="percentage">
            <text:p>65.00%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Muy difícil</text:p>
          </table:table-cell>
          <table:table-cell table:style-name="ce7" office:value-type="float" office:value="4" calcext:value-type="float">
            <text:p>4</text:p>
          </table:table-cell>
          <table:table-cell table:style-name="ce6" table:formula="of:=COUNTIF([$Respuetas.F6:.F25];4)" office:value-type="float" office:value="0" calcext:value-type="float">
            <text:p>0</text:p>
          </table:table-cell>
          <table:table-cell table:style-name="ce9" table:formula="of:=[.D8]/[.$D$9]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8"/>
          <table:table-cell table:style-name="ce2" table:formula="of:=SUM([.D5:.D8])" office:value-type="float" office:value="20" calcext:value-type="float">
            <text:p>20</text:p>
          </table:table-cell>
          <table:table-cell table:style-name="ce9" table:formula="of:=[.D9]/[.$D$9]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Pregunta 5'.F25" table:end-x="27.58pt" table:end-y="2.24pt" draw:z-index="0" draw:name="Chart 5" draw:style-name="gr1" draw:text-style-name="P1" svg:width="347.98pt" svg:height="215.23pt" svg:x="72pt" svg:y="7.51pt">
              <draw:object draw:notify-on-update-of-ranges="'Pregunta 5'.B5:'Pregunta 5'.B8 'Pregunta 5'.D4:'Pregunta 5'.D4 'Pregunta 5'.D5:'Pregunta 5'.D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98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gunta 6" table:style-name="ta8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6. ¿Recibió respuesta del PQRS en un tiempo adecuado?</text:p>
          </table:table-cell>
          <table:table-cell table:style-name="ce11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>
            <text:p>Respuesta</text:p>
          </table:table-cell>
          <table:table-cell table:style-name="ce16" office:value-type="string" calcext:value-type="string">
            <text:p>Código</text:p>
          </table:table-cell>
          <table:table-cell table:style-name="ce16" office:value-type="string" calcext:value-type="string">
            <text:p>Frecuencia</text:p>
          </table:table-cell>
          <table:table-cell table:style-name="ce16" office:value-type="string" calcext:value-type="string">
            <text:p>Porcentaje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Si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COUNTIF([$Respuetas.G4:.G23];1)" office:value-type="float" office:value="6" calcext:value-type="float">
            <text:p>6</text:p>
          </table:table-cell>
          <table:table-cell table:style-name="ce19" table:formula="of:=[.D5]/[.$D$8]" office:value-type="percentage" office:value="0.3" calcext:value-type="percentage">
            <text:p>30%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string" calcext:value-type="string">
            <text:p>No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COUNTIF([$Respuetas.G4:.G23];2)" office:value-type="float" office:value="1" calcext:value-type="float">
            <text:p>1</text:p>
          </table:table-cell>
          <table:table-cell table:style-name="ce19" table:formula="of:=[.D6]/[.$D$8]" office:value-type="percentage" office:value="0.05" calcext:value-type="percentage">
            <text:p>5%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string" calcext:value-type="string">
            <text:p>No he registrado ninguna PQRS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COUNTIF([$Respuetas.G4:.G23];3)" office:value-type="float" office:value="13" calcext:value-type="float">
            <text:p>13</text:p>
          </table:table-cell>
          <table:table-cell table:style-name="ce19" table:formula="of:=[.D7]/[.$D$8]" office:value-type="percentage" office:value="0.65" calcext:value-type="percentage">
            <text:p>65%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8"/>
          <table:table-cell table:style-name="ce7" table:formula="of:=SUM([.D4:.D7])" office:value-type="float" office:value="20" calcext:value-type="float">
            <text:p>20</text:p>
          </table:table-cell>
          <table:table-cell table:style-name="ce19" table:formula="of:=SUM([.E5:.E7])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Pregunta 6'.F23" table:end-x="32.17pt" table:end-y="10.49pt" draw:z-index="0" draw:name="Chart 6" draw:style-name="gr1" draw:text-style-name="P1" svg:width="368.22pt" svg:height="200.98pt" svg:x="48.76pt" svg:y="14.26pt">
              <draw:object draw:notify-on-update-of-ranges="'Pregunta 6'.B5:'Pregunta 6'.B7 'Pregunta 6'.D4:'Pregunta 6'.D4 'Pregunta 6'.D5:'Pregunta 6'.D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99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gunta 7" table:style-name="ta9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7. ¿Qué tan fácil es registrar o hacer seguimiento al desempeño atletico en el Club?</text:p>
          </table:table-cell>
          <table:table-cell table:number-columns-repeated="1022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Respuesta</text:p>
          </table:table-cell>
          <table:table-cell table:style-name="ce4" office:value-type="string" calcext:value-type="string">
            <text:p>Código</text:p>
          </table:table-cell>
          <table:table-cell table:style-name="ce4" office:value-type="string" calcext:value-type="string">
            <text:p>Frecuencia</text:p>
          </table:table-cell>
          <table:table-cell table:style-name="ce4" office:value-type="string" calcext:value-type="string">
            <text:p>Porcentaj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Es fáci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COUNTIF([$Respuetas.H3:.H22];1)" office:value-type="float" office:value="5" calcext:value-type="float">
            <text:p>5</text:p>
          </table:table-cell>
          <table:table-cell table:style-name="ce21" table:formula="of:=[.D5]/[.$D$9]" office:value-type="percentage" office:value="0.25" calcext:value-type="percentage">
            <text:p>25%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Es complicado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COUNTIF([$Respuetas.H4:.H23];2)" office:value-type="float" office:value="2" calcext:value-type="float">
            <text:p>2</text:p>
          </table:table-cell>
          <table:table-cell table:style-name="ce21" table:formula="of:=[.D6]/[.$D$9]" office:value-type="percentage" office:value="0.1" calcext:value-type="percentage">
            <text:p>10%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o contamos con un sistema claro para registrar el desempeño</text:p>
          </table:table-cell>
          <table:table-cell table:style-name="ce7" office:value-type="float" office:value="3" calcext:value-type="float">
            <text:p>3</text:p>
          </table:table-cell>
          <table:table-cell table:style-name="ce6" table:formula="of:=COUNTIF([$Respuetas.H5:.H24];3)" office:value-type="float" office:value="13" calcext:value-type="float">
            <text:p>13</text:p>
          </table:table-cell>
          <table:table-cell table:style-name="ce21" table:formula="of:=[.D7]/[.$D$9]" office:value-type="percentage" office:value="0.65" calcext:value-type="percentage">
            <text:p>65%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o aplica</text:p>
          </table:table-cell>
          <table:table-cell table:style-name="ce7" office:value-type="float" office:value="4" calcext:value-type="float">
            <text:p>4</text:p>
          </table:table-cell>
          <table:table-cell table:style-name="ce6" table:formula="of:=COUNTIF([$Respuetas.H6:.H25];4)" office:value-type="float" office:value="0" calcext:value-type="float">
            <text:p>0</text:p>
          </table:table-cell>
          <table:table-cell table:style-name="ce21" table:formula="of:=[.D8]/[.$D$9]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8"/>
          <table:table-cell table:style-name="ce6" table:formula="of:=SUM([.D5:.D8])" office:value-type="float" office:value="20" calcext:value-type="float">
            <text:p>20</text:p>
          </table:table-cell>
          <table:table-cell table:style-name="ce21" table:formula="of:=[.D9]/[.$D$9]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Pregunta 7'.E26" table:end-x="13.18pt" table:end-y="11.99pt" draw:z-index="0" draw:name="Chart 7" draw:style-name="gr1" draw:text-style-name="P1" svg:width="394.47pt" svg:height="233.97pt" svg:x="4.88pt" svg:y="14.26pt">
              <draw:object draw:notify-on-update-of-ranges="'Pregunta 7'.B4:'Pregunta 7'.B8 'Pregunta 7'.E2:'Pregunta 7'.E3 'Pregunta 7'.E4:'Pregunta 7'.E8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98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gunta 8" table:style-name="ta10">
        <table:table-column table:style-name="co1" table:default-cell-style-name="Default"/>
        <table:table-column table:style-name="co23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8. ¿El Club Blood Tigers Cheer le ayuda a identificar fortalezas y debilidades en su rendimiento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Respuesta</text:p>
          </table:table-cell>
          <table:table-cell table:style-name="ce4" office:value-type="string" calcext:value-type="string">
            <text:p>Código</text:p>
          </table:table-cell>
          <table:table-cell table:style-name="ce4" office:value-type="string" calcext:value-type="string">
            <text:p>Frecuencia</text:p>
          </table:table-cell>
          <table:table-cell table:style-name="ce4" office:value-type="string" calcext:value-type="string">
            <text:p>Porcentaje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Si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COUNTIF([$Respuetas.I4:.I23];1)" office:value-type="float" office:value="7" calcext:value-type="float">
            <text:p>7</text:p>
          </table:table-cell>
          <table:table-cell table:style-name="ce9" table:formula="of:=[.D5]/[.$D$9]" office:value-type="percentage" office:value="0.35" calcext:value-type="percentage">
            <text:p>35.00%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COUNTIF([$Respuetas.I5:.I24];2)" office:value-type="float" office:value="0" calcext:value-type="float">
            <text:p>0</text:p>
          </table:table-cell>
          <table:table-cell table:style-name="ce9" table:formula="of:=[.D6]/[.$D$9]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La manera actual no es la mas adecuada</text:p>
          </table:table-cell>
          <table:table-cell table:style-name="ce7" office:value-type="float" office:value="3" calcext:value-type="float">
            <text:p>3</text:p>
          </table:table-cell>
          <table:table-cell table:style-name="ce6" table:formula="of:=COUNTIF([$Respuetas.I6:.I25];3)" office:value-type="float" office:value="13" calcext:value-type="float">
            <text:p>13</text:p>
          </table:table-cell>
          <table:table-cell table:style-name="ce9" table:formula="of:=[.D7]/[.$D$9]" office:value-type="percentage" office:value="0.65" calcext:value-type="percentage">
            <text:p>65.00%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No aplica</text:p>
          </table:table-cell>
          <table:table-cell table:style-name="ce7" office:value-type="float" office:value="4" calcext:value-type="float">
            <text:p>4</text:p>
          </table:table-cell>
          <table:table-cell table:style-name="ce6" table:formula="of:=COUNTIF([$Respuetas.I7:.I26];4)" office:value-type="float" office:value="0" calcext:value-type="float">
            <text:p>0</text:p>
          </table:table-cell>
          <table:table-cell table:style-name="ce9" table:formula="of:=[.D8]/[.$D$9]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8"/>
          <table:table-cell table:style-name="ce2" table:formula="of:=SUM([.D5:.D8])" office:value-type="float" office:value="20" calcext:value-type="float">
            <text:p>20</text:p>
          </table:table-cell>
          <table:table-cell table:style-name="ce9" table:formula="of:=[.D9]/[.$D$9]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'Pregunta 8'.E26" table:end-x="66.27pt" table:end-y="9.72pt" draw:z-index="0" draw:name="Chart 8" draw:style-name="gr1" draw:text-style-name="P1" svg:width="380.21pt" svg:height="228.73pt" svg:x="4.88pt" svg:y="1.5pt">
              <draw:object draw:notify-on-update-of-ranges="'Pregunta 8'.B5:'Pregunta 8'.B8 'Pregunta 8'.D4:'Pregunta 8'.D4 'Pregunta 8'.D5:'Pregunta 8'.D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98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gunta 9" table:style-name="ta11"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10. ¿Cree que identificar fortalezas y debilidades ayuda a mejorar el rendimiento deportivo?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espuesta</text:p>
          </table:table-cell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Frecuencia</text:p>
          </table:table-cell>
          <table:table-cell table:style-name="ce2" office:value-type="string" calcext:value-type="string">
            <text:p>Porcentaj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i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COUNTIF([$Respuetas.J4:.J23];1)" office:value-type="float" office:value="20" calcext:value-type="float">
            <text:p>20</text:p>
          </table:table-cell>
          <table:table-cell table:style-name="ce12" table:formula="of:=[.D4]/[.$D$7]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COUNTIF([$Respuetas.J5:.J24];2)" office:value-type="float" office:value="0" calcext:value-type="float">
            <text:p>0</text:p>
          </table:table-cell>
          <table:table-cell table:style-name="ce12" table:formula="of:=[.D5]/[.$D$7]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o aplica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COUNTIF([$Respuetas.J6:.J25];3)" office:value-type="float" office:value="0" calcext:value-type="float">
            <text:p>0</text:p>
          </table:table-cell>
          <table:table-cell table:style-name="ce12" table:formula="of:=[.D6]/[.$D$7]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8"/>
          <table:table-cell table:style-name="ce2" table:formula="of:=SUM([.D4:.D6])" office:value-type="float" office:value="20" calcext:value-type="float">
            <text:p>20</text:p>
          </table:table-cell>
          <table:table-cell table:style-name="ce12" table:formula="of:=[.D7]/[.$D$7]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'Pregunta 9'.F23" table:end-x="24.66pt" table:end-y="15.7pt" draw:z-index="0" draw:name="Chart 9" draw:style-name="gr1" draw:text-style-name="P1" svg:width="371.23pt" svg:height="219.71pt" svg:x="0.74pt" svg:y="0.74pt">
              <draw:object draw:notify-on-update-of-ranges="'Pregunta 9'.B10:'Pregunta 9'.B10 'Pregunta 9'.B4:'Pregunta 9'.B6 'Pregunta 9'.D4:'Pregunta 9'.D6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99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gunta 10" table:style-name="ta12"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8" table:number-columns-repeated="2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1" table:number-columns-repeated="6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10. ¿Cree que la implementación de un sistema (Web y Móvil) mejoraría las problematicas mencionadas anteriormente?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table-cell/>
          <table:table-cell table:style-name="ce20" table:number-columns-repeated="4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Respuesta</text:p>
          </table:table-cell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Frecuencia</text:p>
          </table:table-cell>
          <table:table-cell table:style-name="ce2" office:value-type="string" calcext:value-type="string">
            <text:p>Porcentaj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Mejoraría much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COUNTIF([$Respuetas.K4:.K23];1)" office:value-type="float" office:value="7" calcext:value-type="float">
            <text:p>7</text:p>
          </table:table-cell>
          <table:table-cell table:style-name="ce12" table:formula="of:=[.D8]/[.$D$12]" office:value-type="percentage" office:value="0.35" calcext:value-type="percentage">
            <text:p>35%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Mejoraría 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COUNTIF([$Respuetas.K5:.K24];2)" office:value-type="float" office:value="9" calcext:value-type="float">
            <text:p>9</text:p>
          </table:table-cell>
          <table:table-cell table:style-name="ce12" table:formula="of:=[.D9]/[.$D$12]" office:value-type="percentage" office:value="0.45" calcext:value-type="percentage">
            <text:p>45%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al vez mejoraría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COUNTIF([$Respuetas.K6:.K25];3)" office:value-type="float" office:value="4" calcext:value-type="float">
            <text:p>4</text:p>
          </table:table-cell>
          <table:table-cell table:style-name="ce12" table:formula="of:=[.D10]/[.$D$12]" office:value-type="percentage" office:value="0.2" calcext:value-type="percentage">
            <text:p>20%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o mejoraría nada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COUNTIF([$Respuetas.K7:.K26];4)" office:value-type="float" office:value="0" calcext:value-type="float">
            <text:p>0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8"/>
          <table:table-cell table:style-name="ce2" table:formula="of:=SUM([.D8:.D10])" office:value-type="float" office:value="20" calcext:value-type="float">
            <text:p>20</text:p>
          </table:table-cell>
          <table:table-cell table:style-name="ce12" table:formula="of:=[.D12]/[.$D$12]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'Pregunta 10'.F28" table:end-x="0.82pt" table:end-y="7.51pt" draw:z-index="0" draw:name="Chart 10" draw:style-name="gr1" draw:text-style-name="P1" svg:width="388.46pt" svg:height="212.23pt" svg:x="2.61pt" svg:y="0.03pt">
              <draw:object draw:notify-on-update-of-ranges="'Pregunta 10'.B7:'Pregunta 10'.B11 'Pregunta 10'.D5:'Pregunta 10'.D6 'Pregunta 10'.D7:'Pregunta 10'.D11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98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Arial" svg:font-family="Arial"/>
    <style:font-face style:name="Cambria" svg:font-family="Cambria"/>
    <style:font-face style:name="Google Sans" svg:font-family="'Google Sans'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eguntas" style:display-name="PageStyle_Pregun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puetas" style:display-name="PageStyle_Respue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gunta_20_1" style:display-name="PageStyle_Pregunt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gunta_20_2" style:display-name="PageStyle_Pregunt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gunta_20_3" style:display-name="PageStyle_Pregunta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gunta_20_4" style:display-name="PageStyle_Pregunta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gunta_20_5" style:display-name="PageStyle_Pregunta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gunta_20_6" style:display-name="PageStyle_Pregunta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gunta_20_7" style:display-name="PageStyle_Pregunta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gunta_20_8" style:display-name="PageStyle_Pregunta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gunta_20_9" style:display-name="PageStyle_Pregunta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gunta_20_10" style:display-name="PageStyle_Pregunta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475" meta:object-count="10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  <style:graphic-properties draw:fill-color="#cccccc"/>
    </style:style>
    <style:style style:name="ch9" style:family="chart">
      <style:chart-properties chart:solid-type="cuboid"/>
      <style:graphic-properties draw:fill-color="#3d85c6"/>
    </style:style>
    <style:style style:name="ch10" style:family="chart">
      <style:chart-properties chart:solid-type="cuboid"/>
      <style:graphic-properties draw:fill-color="#073763"/>
    </style:style>
    <style:style style:name="ch11" style:family="chart">
      <style:chart-properties chart:solid-type="cuboid"/>
      <style:graphic-properties draw:fill-color="#34a853"/>
    </style:style>
    <style:style style:name="ch12" style:family="chart">
      <style:graphic-properties draw:fill="solid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023cm" svg:height="8.07cm" xlink:href=".." xlink:type="simple" chart:class="chart:circle" chart:style-name="ch1">
        <chart:legend chart:legend-position="end" svg:x="9.405cm" svg:y="2.592cm" style:legend-expansion="high" chart:style-name="ch2"/>
        <chart:plot-area chart:style-name="ch3" table:cell-range-address="'Pregunta 1'.B4:'Pregunta 1'.B7 'Pregunta 1'.D4:'Pregunta 1'.D7" chart:data-source-has-labels="column" svg:x="0.28cm" svg:y="0.161cm" svg:width="8.845cm" svg:height="7.748cm" dr3d:transform="matrix (0.906306771049824 0 -0.42262044052464 -0.323746279512272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0.28cm" svg:y="0.32cm" svg:width="8.845cm" svg:height="7.43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Pregunta 1'.B4:'Pregunta 1'.B7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'Pregunta 1'.D4:'Pregunta 1'.D7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Calendario Digital</text:p>
                <draw:g>
                  <svg:desc>'Pregunta 1'.B4:'Pregunta 1'.B7</svg:desc>
                </draw:g>
              </table:table-cell>
              <table:table-cell office:value-type="float" office:value="1">
                <text:p>1</text:p>
                <draw:g>
                  <svg:desc>'Pregunta 1'.D4:'Pregunta 1'.D7</svg:desc>
                </draw:g>
              </table:table-cell>
            </table:table-row>
            <table:table-row>
              <table:table-cell office:value-type="string">
                <text:p>Notas o recordatorios por WhatsApp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o utilzo ninguna herramien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Otro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  <style:graphic-properties draw:fill-color="#3d85c6"/>
    </style:style>
    <style:style style:name="ch9" style:family="chart">
      <style:chart-properties chart:solid-type="cuboid"/>
      <style:graphic-properties draw:fill-color="#073763"/>
    </style:style>
    <style:style style:name="ch10" style:family="chart">
      <style:chart-properties chart:solid-type="cuboid"/>
      <style:graphic-properties draw:fill-color="#cccccc"/>
    </style:style>
    <style:style style:name="ch11" style:family="chart">
      <style:chart-properties chart:solid-type="cuboid"/>
      <style:graphic-properties draw:fill-color="#34a853"/>
    </style:style>
    <style:style style:name="ch12" style:family="chart">
      <style:chart-properties chart:solid-type="cuboid"/>
      <style:graphic-properties draw:fill-color="#ff6d01"/>
    </style:style>
    <style:style style:name="ch13" style:family="chart">
      <style:graphic-properties draw:fill="solid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3.705cm" svg:height="7.488cm" xlink:href=".." xlink:type="simple" chart:class="chart:circle" chart:style-name="ch1">
        <chart:legend chart:legend-position="end" svg:x="10.145cm" svg:y="2.449cm" style:legend-expansion="high" chart:style-name="ch2"/>
        <chart:plot-area chart:style-name="ch3" table:cell-range-address="'Pregunta 10'.B7:'Pregunta 10'.B11 'Pregunta 10'.D5:'Pregunta 10'.D11" chart:data-source-has-labels="both" svg:x="0.274cm" svg:y="0.149cm" svg:width="9.597cm" svg:height="7.19cm" dr3d:transform="matrix (0.906306771049824 0 -0.42262044052464 -0.323746279512272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0.794cm" svg:y="0.149cm" svg:width="8.557cm" svg:height="7.19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Pregunta 10'.B7:'Pregunta 10'.B11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'Pregunta 10'.D7:'Pregunta 10'.D11" chart:label-cell-address="'Pregunta 10'.D5:'Pregunta 10'.D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Pregunta 10'.D5:'Pregunta 10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spuesta</text:p>
                <draw:g>
                  <svg:desc>'Pregunta 10'.B7:'Pregunta 10'.B11</svg:desc>
                </draw:g>
              </table:table-cell>
              <table:table-cell office:value-type="float" office:value="NaN">
                <text:p>NaN</text:p>
                <draw:g>
                  <svg:desc>'Pregunta 10'.D7:'Pregunta 10'.D11</svg:desc>
                </draw:g>
              </table:table-cell>
            </table:table-row>
            <table:table-row>
              <table:table-cell office:value-type="string">
                <text:p>Mejoraría mucho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ejoraría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al vez mejorarí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o mejoraría nada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  <style:graphic-properties draw:fill-color="#b7b7b7"/>
    </style:style>
    <style:style style:name="ch9" style:family="chart">
      <style:chart-properties chart:solid-type="cuboid"/>
      <style:graphic-properties draw:fill-color="#cccccc"/>
    </style:style>
    <style:style style:name="ch10" style:family="chart">
      <style:chart-properties chart:solid-type="cuboid"/>
      <style:graphic-properties draw:fill-color="#3d85c6"/>
    </style:style>
    <style:style style:name="ch11" style:family="chart">
      <style:chart-properties chart:solid-type="cuboid"/>
      <style:graphic-properties draw:fill-color="#073763"/>
    </style:style>
    <style:style style:name="ch12" style:family="chart">
      <style:graphic-properties draw:fill="solid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843cm" svg:height="7.726cm" xlink:href=".." xlink:type="simple" chart:class="chart:circle" chart:style-name="ch1">
        <chart:legend chart:legend-position="end" svg:x="10.093cm" svg:y="2.42cm" style:legend-expansion="high" chart:style-name="ch2"/>
        <chart:plot-area chart:style-name="ch3" table:cell-range-address="'Pregunta 2'.B4:'Pregunta 2'.B7 'Pregunta 2'.E2:'Pregunta 2'.E7" chart:data-source-has-labels="both" svg:x="0.296cm" svg:y="0.154cm" svg:width="9.501cm" svg:height="7.418cm" dr3d:transform="matrix (0.906306771049824 0 -0.42262044052464 -0.323746279512272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0.632cm" svg:y="0.154cm" svg:width="8.828cm" svg:height="7.418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Pregunta 2'.B4:'Pregunta 2'.B7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'Pregunta 2'.E4:'Pregunta 2'.E7" chart:label-cell-address="'Pregunta 2'.E2:'Pregunta 2'.E3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Pregunta 2'.E2:'Pregunta 2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spuesta</text:p>
                <draw:g>
                  <svg:desc>'Pregunta 2'.B4:'Pregunta 2'.B7</svg:desc>
                </draw:g>
              </table:table-cell>
              <table:table-cell office:value-type="float" office:value="NaN">
                <text:p>NaN</text:p>
                <draw:g>
                  <svg:desc>'Pregunta 2'.E4:'Pregunta 2'.E7</svg:desc>
                </draw:g>
              </table:table-cell>
            </table:table-row>
            <table:table-row>
              <table:table-cell office:value-type="string">
                <text:p>Sí, he tenido dificultades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No, las manejo sin problemas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No utilizo herramientas de gestión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  <style:graphic-properties draw:fill-color="#073763"/>
    </style:style>
    <style:style style:name="ch9" style:family="chart">
      <style:chart-properties chart:solid-type="cuboid"/>
      <style:graphic-properties draw:fill-color="#3d85c6"/>
    </style:style>
    <style:style style:name="ch10" style:family="chart">
      <style:graphic-properties draw:fill="solid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742cm" svg:height="7.594cm" xlink:href=".." xlink:type="simple" chart:class="chart:circle" chart:style-name="ch1">
        <chart:legend chart:legend-position="end" svg:x="9.537cm" svg:y="3.249cm" style:legend-expansion="high" chart:style-name="ch2"/>
        <chart:plot-area chart:style-name="ch3" table:cell-range-address="'Pregunta 3'.B5:'Pregunta 3'.B6 'Pregunta 3'.D4:'Pregunta 3'.D6" chart:data-source-has-labels="both" svg:x="0.214cm" svg:y="0.151cm" svg:width="9.109cm" svg:height="7.292cm" dr3d:transform="matrix (0.906306771049824 0 -0.42262044052464 -0.323746279512272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0.429cm" svg:y="0.151cm" svg:width="8.678cm" svg:height="7.292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Pregunta 3'.B5:'Pregunta 3'.B6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'Pregunta 3'.D5:'Pregunta 3'.D6" chart:label-cell-address="'Pregunta 3'.D4:'Pregunta 3'.D4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cuencia</text:p>
                <draw:g>
                  <svg:desc>'Pregunta 3'.D4:'Pregunta 3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Sí</text:p>
                <draw:g>
                  <svg:desc>'Pregunta 3'.B5:'Pregunta 3'.B6</svg:desc>
                </draw:g>
              </table:table-cell>
              <table:table-cell office:value-type="float" office:value="15">
                <text:p>15</text:p>
                <draw:g>
                  <svg:desc>'Pregunta 3'.D5:'Pregunta 3'.D6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  <style:graphic-properties draw:fill-color="#4285f4"/>
    </style:style>
    <style:style style:name="ch9" style:family="chart">
      <style:chart-properties chart:solid-type="cuboid"/>
      <style:graphic-properties draw:fill-color="#0b5394"/>
    </style:style>
    <style:style style:name="ch10" style:family="chart">
      <style:chart-properties chart:solid-type="cuboid"/>
      <style:graphic-properties draw:fill-color="#fbbc04"/>
    </style:style>
    <style:style style:name="ch11" style:family="chart">
      <style:chart-properties chart:solid-type="cuboid"/>
      <style:graphic-properties draw:fill-color="#999999"/>
    </style:style>
    <style:style style:name="ch12" style:family="chart">
      <style:graphic-properties draw:fill="solid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822cm" svg:height="8.149cm" xlink:href=".." xlink:type="simple" chart:class="chart:circle" chart:style-name="ch1">
        <chart:legend chart:legend-position="end" svg:x="10.357cm" svg:y="2.234cm" style:legend-expansion="high" chart:style-name="ch2"/>
        <chart:plot-area chart:style-name="ch3" table:cell-range-address="'Pregunta 4'.B5:'Pregunta 4'.B8 'Pregunta 4'.D4:'Pregunta 4'.D8" chart:data-source-has-labels="both" svg:x="0.316cm" svg:y="0.162cm" svg:width="9.725cm" svg:height="7.825cm" dr3d:transform="matrix (0.906306771049824 0 -0.42262044052464 -0.323746279512272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0.521cm" svg:y="0.162cm" svg:width="9.315cm" svg:height="7.825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Pregunta 4'.B5:'Pregunta 4'.B8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'Pregunta 4'.D5:'Pregunta 4'.D8" chart:label-cell-address="'Pregunta 4'.D4:'Pregunta 4'.D4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cuencia</text:p>
                <draw:g>
                  <svg:desc>'Pregunta 4'.D4:'Pregunta 4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cumplimiento en la entrega o reposición</text:p>
                <draw:g>
                  <svg:desc>'Pregunta 4'.B5:'Pregunta 4'.B8</svg:desc>
                </draw:g>
              </table:table-cell>
              <table:table-cell office:value-type="float" office:value="4">
                <text:p>4</text:p>
                <draw:g>
                  <svg:desc>'Pregunta 4'.D5:'Pregunta 4'.D8</svg:desc>
                </draw:g>
              </table:table-cell>
            </table:table-row>
            <table:table-row>
              <table:table-cell office:value-type="string">
                <text:p>Desorden en el registrode los elemento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Errores o pérdida de informació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 llevo un control de inventario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  <style:graphic-properties draw:fill-color="#b4a7d6"/>
    </style:style>
    <style:style style:name="ch9" style:family="chart">
      <style:chart-properties chart:solid-type="cuboid"/>
      <style:graphic-properties draw:fill-color="#c27ba0"/>
    </style:style>
    <style:style style:name="ch10" style:family="chart">
      <style:chart-properties chart:solid-type="cuboid"/>
      <style:graphic-properties draw:fill-color="#9fc5e8"/>
    </style:style>
    <style:style style:name="ch11" style:family="chart">
      <style:chart-properties chart:solid-type="cuboid"/>
      <style:graphic-properties draw:fill-color="#34a853"/>
    </style:style>
    <style:style style:name="ch12" style:family="chart">
      <style:graphic-properties draw:fill="solid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277cm" svg:height="7.594cm" xlink:href=".." xlink:type="simple" chart:class="chart:circle" chart:style-name="ch1">
        <chart:legend chart:legend-position="end" svg:x="9.934cm" svg:y="2.751cm" style:legend-expansion="high" chart:style-name="ch2"/>
        <chart:plot-area chart:style-name="ch3" table:cell-range-address="'Pregunta 5'.B5:'Pregunta 5'.B8 'Pregunta 5'.D4:'Pregunta 5'.D8" chart:data-source-has-labels="both" svg:x="0.245cm" svg:y="0.151cm" svg:width="9.444cm" svg:height="7.292cm" dr3d:transform="matrix (0.906306771049824 0 -0.42262044052464 -0.323746279512272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0.628cm" svg:y="0.151cm" svg:width="8.678cm" svg:height="7.292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Pregunta 5'.B5:'Pregunta 5'.B8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'Pregunta 5'.D5:'Pregunta 5'.D8" chart:label-cell-address="'Pregunta 5'.D4:'Pregunta 5'.D4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cuencia</text:p>
                <draw:g>
                  <svg:desc>'Pregunta 5'.D4:'Pregunta 5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y fácil</text:p>
                <draw:g>
                  <svg:desc>'Pregunta 5'.B5:'Pregunta 5'.B8</svg:desc>
                </draw:g>
              </table:table-cell>
              <table:table-cell office:value-type="float" office:value="2">
                <text:p>2</text:p>
                <draw:g>
                  <svg:desc>'Pregunta 5'.D5:'Pregunta 5'.D8</svg:desc>
                </draw:g>
              </table:table-cell>
            </table:table-row>
            <table:table-row>
              <table:table-cell office:value-type="string">
                <text:p>Fáci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ifícil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uy difícil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3d85c6"/>
    </style:style>
    <style:style style:name="ch8" style:family="chart">
      <style:chart-properties chart:solid-type="cuboid"/>
      <style:graphic-properties draw:fill-color="#cccccc"/>
    </style:style>
    <style:style style:name="ch9" style:family="chart">
      <style:chart-properties chart:solid-type="cuboid"/>
      <style:graphic-properties draw:fill-color="#073763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991cm" svg:height="7.091cm" xlink:href=".." xlink:type="simple" chart:class="chart:circle" chart:style-name="ch1">
        <chart:legend chart:legend-position="end" svg:x="8.426cm" svg:y="2.549cm" style:legend-expansion="high" chart:style-name="ch2"/>
        <chart:plot-area chart:style-name="ch3" table:cell-range-address="'Pregunta 6'.B5:'Pregunta 6'.B7 'Pregunta 6'.D4:'Pregunta 6'.D7" chart:data-source-has-labels="both" svg:x="0.259cm" svg:y="0.141cm" svg:width="7.908cm" svg:height="6.809cm">
          <chartooo:coordinate-region svg:x="0.809cm" svg:y="0.142cm" svg:width="6.808cm" svg:height="6.808cm"/>
          <chart:axis chart:dimension="x" chart:name="primary-x" chart:style-name="ch4" chartooo:axis-type="text">
            <chart:categories table:cell-range-address="'Pregunta 6'.B5:'Pregunta 6'.B7"/>
          </chart:axis>
          <chart:axis chart:dimension="y" chart:name="primary-y" chart:style-name="ch5"/>
          <chart:series chart:style-name="ch6" chart:values-cell-range-address="'Pregunta 6'.D5:'Pregunta 6'.D7" chart:label-cell-address="'Pregunta 6'.D4:'Pregunta 6'.D4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cuencia</text:p>
                <draw:g>
                  <svg:desc>'Pregunta 6'.D4:'Pregunta 6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</text:p>
                <draw:g>
                  <svg:desc>'Pregunta 6'.B5:'Pregunta 6'.B7</svg:desc>
                </draw:g>
              </table:table-cell>
              <table:table-cell office:value-type="float" office:value="6">
                <text:p>6</text:p>
                <draw:g>
                  <svg:desc>'Pregunta 6'.D5:'Pregunta 6'.D7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 he registrado ninguna PQRS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  <style:graphic-properties draw:fill-color="#3d85c6"/>
    </style:style>
    <style:style style:name="ch9" style:family="chart">
      <style:chart-properties chart:solid-type="cuboid"/>
      <style:graphic-properties draw:fill-color="#cccccc"/>
    </style:style>
    <style:style style:name="ch10" style:family="chart">
      <style:chart-properties chart:solid-type="cuboid"/>
      <style:graphic-properties draw:fill-color="#07376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917cm" svg:height="8.255cm" xlink:href=".." xlink:type="simple" chart:class="chart:circle" chart:style-name="ch1">
        <chart:legend chart:legend-position="end" svg:x="9.669cm" svg:y="2.435cm" style:legend-expansion="high" chart:style-name="ch2"/>
        <chart:plot-area chart:style-name="ch3" table:cell-range-address="'Pregunta 7'.B4:'Pregunta 7'.B8 'Pregunta 7'.E2:'Pregunta 7'.E8" chart:data-source-has-labels="both" svg:x="0.278cm" svg:y="0.165cm" svg:width="9.113cm" svg:height="7.925cm" dr3d:transform="matrix (0.906306771049824 0 -0.42262044052464 -0.323746279512272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0.278cm" svg:y="0.3cm" svg:width="9.113cm" svg:height="7.655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Pregunta 7'.B4:'Pregunta 7'.B8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'Pregunta 7'.E4:'Pregunta 7'.E8" chart:label-cell-address="'Pregunta 7'.E2:'Pregunta 7'.E3" chart:class="chart:circle">
            <chart:data-point chart:style-name="ch8" chart:repeated="2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Pregunta 7'.E2:'Pregunta 7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spuesta</text:p>
                <draw:g>
                  <svg:desc>'Pregunta 7'.B4:'Pregunta 7'.B8</svg:desc>
                </draw:g>
              </table:table-cell>
              <table:table-cell office:value-type="float" office:value="NaN">
                <text:p>NaN</text:p>
                <draw:g>
                  <svg:desc>'Pregunta 7'.E4:'Pregunta 7'.E8</svg:desc>
                </draw:g>
              </table:table-cell>
            </table:table-row>
            <table:table-row>
              <table:table-cell office:value-type="string">
                <text:p>Es fácil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Es complicado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No contamos con un sistema claro para registrar el desempeño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No aplica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  <style:graphic-properties draw:fill-color="#073763"/>
    </style:style>
    <style:style style:name="ch9" style:family="chart">
      <style:chart-properties chart:solid-type="cuboid"/>
      <style:graphic-properties draw:fill-color="#ea4335"/>
    </style:style>
    <style:style style:name="ch10" style:family="chart">
      <style:chart-properties chart:solid-type="cuboid"/>
      <style:graphic-properties draw:fill-color="#3d85c6"/>
    </style:style>
    <style:style style:name="ch11" style:family="chart">
      <style:chart-properties chart:solid-type="cuboid"/>
      <style:graphic-properties draw:fill-color="#34a853"/>
    </style:style>
    <style:style style:name="ch12" style:family="chart">
      <style:graphic-properties draw:fill="solid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414cm" svg:height="8.07cm" xlink:href=".." xlink:type="simple" chart:class="chart:circle" chart:style-name="ch1">
        <chart:legend chart:legend-position="end" svg:x="8.69cm" svg:y="2.79cm" style:legend-expansion="high" chart:style-name="ch2"/>
        <chart:plot-area chart:style-name="ch3" table:cell-range-address="'Pregunta 8'.B5:'Pregunta 8'.B8 'Pregunta 8'.D4:'Pregunta 8'.D8" chart:data-source-has-labels="both" svg:x="0.268cm" svg:y="0.161cm" svg:width="8.154cm" svg:height="7.748cm" dr3d:transform="matrix (0.906306771049824 0 -0.42262044052464 -0.323746279512272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0.268cm" svg:y="0.61cm" svg:width="8.154cm" svg:height="6.85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Pregunta 8'.B5:'Pregunta 8'.B8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'Pregunta 8'.D5:'Pregunta 8'.D8" chart:label-cell-address="'Pregunta 8'.D4:'Pregunta 8'.D4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cuencia</text:p>
                <draw:g>
                  <svg:desc>'Pregunta 8'.D4:'Pregunta 8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</text:p>
                <draw:g>
                  <svg:desc>'Pregunta 8'.B5:'Pregunta 8'.B8</svg:desc>
                </draw:g>
              </table:table-cell>
              <table:table-cell office:value-type="float" office:value="7">
                <text:p>7</text:p>
                <draw:g>
                  <svg:desc>'Pregunta 8'.D5:'Pregunta 8'.D8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a manera actual no es la mas adecuada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No aplica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3.097cm" svg:height="7.752cm" xlink:href=".." xlink:type="simple" chart:class="chart:bar" chart:style-name="ch1">
        <chart:legend chart:legend-position="end" svg:x="10.834cm" svg:y="3.328cm" style:legend-expansion="high" chart:style-name="ch2"/>
        <chart:plot-area chart:style-name="ch3" table:cell-range-address="'Pregunta 9'.B10:'Pregunta 9'.B10 'Pregunta 9'.B4:'Pregunta 9'.B6 'Pregunta 9'.D4:'Pregunta 9'.D6" chart:data-source-has-labels="column" svg:x="0.261cm" svg:y="0.155cm" svg:width="10.312cm" svg:height="7.442cm">
          <chartooo:coordinate-region svg:x="0.732cm" svg:y="0.355cm" svg:width="9.841cm" svg:height="7.043cm"/>
          <chart:axis chart:dimension="x" chart:name="primary-x" chart:style-name="ch4" chartooo:axis-type="text">
            <chart:categories table:cell-range-address="'Pregunta 9'.B10:'Pregunta 9'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egunta 9'.B4:'Pregunta 9'.B6" chart:class="chart:bar">
            <chart:data-point chart:repeated="3"/>
          </chart:series>
          <chart:series chart:style-name="ch8" chart:values-cell-range-address="'Pregunta 9'.D4:'Pregunta 9'.D6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Pregunta 9'.B10:'Pregunta 9'.B10</svg:desc>
                </draw:g>
              </table:table-cell>
              <table:table-cell office:value-type="float" office:value="NaN">
                <text:p>NaN</text:p>
                <draw:g>
                  <svg:desc>'Pregunta 9'.B4:'Pregunta 9'.B6</svg:desc>
                </draw:g>
              </table:table-cell>
              <table:table-cell office:value-type="float" office:value="20">
                <text:p>20</text:p>
                <draw:g>
                  <svg:desc>'Pregunta 9'.D4:'Pregunta 9'.D6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